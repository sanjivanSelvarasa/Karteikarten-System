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UI" svg:font-family="SegoeUI" style:font-family-generic="roman" style:font-pitch="variable"/>
  </office:font-face-decls>
  <office:automatic-styles>
    <style:style style:name="P1" style:family="paragraph" style:parent-style-name="Text_20_body" style:list-style-name="L1">
      <style:text-properties loext:padding="0in" loext:border="non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Heading_20_3">
      <style:paragraph-properties fo:margin-top="0in" fo:margin-bottom="0.0972in" style:contextual-spacing="false" fo:line-height="115%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>
      <style:text-properties fo:color="#000000" loext:opacity="100%" style:font-name="SegoeUI" fo:font-size="11pt" fo:font-style="normal" fo:font-weight="normal" officeooo:paragraph-rsid="0007cc1c" style:font-size-asian="11pt" style:font-style-asian="normal" style:font-weight-asian="normal"/>
    </style:style>
    <style:style style:name="P12" style:family="paragraph" style:parent-style-name="Text_20_body">
      <style:text-properties fo:color="#000000" loext:opacity="100%" style:font-name="SegoeUI" fo:font-size="11pt" style:font-size-asian="11pt"/>
    </style:style>
    <style:style style:name="P13" style:family="paragraph" style:parent-style-name="Text_20_body" style:list-style-name="L9">
      <style:text-properties fo:color="#000000" loext:opacity="100%" style:font-name="SegoeUI" fo:font-size="11pt" style:font-size-asian="11pt"/>
    </style:style>
    <style:style style:name="P14" style:family="paragraph" style:parent-style-name="Standard">
      <style:text-properties officeooo:rsid="0007cc1c" officeooo:paragraph-rsid="0007cc1c"/>
    </style:style>
    <style:style style:name="P15" style:family="paragraph" style:parent-style-name="Standard">
      <style:text-properties officeooo:rsid="00090c6e" officeooo:paragraph-rsid="00090c6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isness Call / Pitch</text:h>
      <text:p text:style-name="Text_20_body">Dauer : 3-5 Minuten</text:p>
      <text:h text:style-name="Heading_20_2" text:outline-level="2">Ziel</text:h>
      <text:p text:style-name="Text_20_body">Erklären Sie verständlich und strukturiert, worum es in Ihrem Projekt geht, sodass der </text:p>
      <text:p text:style-name="Text_20_body">Auftraggeber die wichtigsten Punkte schnell erfassen kann.</text:p>
      <text:h text:style-name="Heading_20_2" text:outline-level="2">Fragen</text:h>
      <text:h text:style-name="Heading_20_3" text:outline-level="3">Wer seid Ihr, eure Rollen vorstellen</text:h>
      <text:list text:style-name="L1">
        <text:list-item>
          <text:p text:style-name="P1"><text:span text:style-name="Strong_20_Emphasis">Sanjivan</text:span> – Projektleiter, Planung und Frontend-Webentwicklung</text:p>
        </text:list-item>
        <text:list-item>
          <text:p text:style-name="P2"><text:span text:style-name="Strong_20_Emphasis">Egor</text:span> – Datenbankspezialist</text:p>
        </text:list-item>
        <text:list-item>
          <text:p text:style-name="P2"><text:span text:style-name="Strong_20_Emphasis">Liam</text:span> – Frontend-Webentwicklung</text:p>
        </text:list-item>
        <text:list-item>
          <text:p text:style-name="P2"><text:span text:style-name="Strong_20_Emphasis">Gian</text:span> – UI-Design und Backend-Entwicklung</text:p>
        </text:list-item>
      </text:list>
      <text:h text:style-name="Heading_20_3" text:outline-level="3">Was ist das Ziel des Projekts?</text:h>
      <text:p text:style-name="Text_20_body">Das Ziel unserer Anwendung ist es, eine Plattform zu entwickeln, auf der Benutzer ihre eigenen Lernkarten erstellen und effizient lernen können.</text:p>
      <text:p text:style-name="Text_20_body">Die Nutzer sollen:</text:p>
      <text:list text:style-name="L2">
        <text:list-item>
          <text:p text:style-name="P3">eigene <text:span text:style-name="Strong_20_Emphasis">Karteikarten erstellen, bearbeiten und organisieren</text:span> können</text:p>
        </text:list-item>
        <text:list-item>
          <text:p text:style-name="P3"><text:span text:style-name="Strong_20_Emphasis">Lernsets verwalten</text:span> können</text:p>
        </text:list-item>
        <text:list-item>
          <text:p text:style-name="P3">Inhalte <text:span text:style-name="Strong_20_Emphasis">strukturiert wiederholen</text:span> können</text:p>
        </text:list-item>
        <text:list-item>
          <text:p text:style-name="P3">und durch ein <text:span text:style-name="Strong_20_Emphasis">intelligentes Wiederholungssystem</text:span> beim Lernen unterstützt werden.</text:p>
        </text:list-item>
      </text:list>
      <text:h text:style-name="Heading_20_3" text:outline-level="3">Welches Problem wird gelöst bzw. welcher Nutzen entsteht?</text:h>
      <text:h text:style-name="Heading_20_3" text:outline-level="3">Problem:</text:h>
      <text:list text:style-name="L3">
        <text:list-item>
          <text:p text:style-name="P4">Viele bestehende Lernplattformen haben einige Nachteile.</text:p>
        </text:list-item>
      </text:list>
      <text:p text:style-name="Text_20_body">Zum Beispiel:</text:p>
      <text:list text:style-name="L4">
        <text:list-item>
          <text:p text:style-name="P5">Personalisierte Lernalgorithmen sind oft <text:span text:style-name="Strong_20_Emphasis">nur in kostenpflichtigen Premium-Versionen verfügbar</text:span></text:p>
        </text:list-item>
        <text:list-item>
          <text:p text:style-name="P5">Lernende wissen häufig <text:span text:style-name="Strong_20_Emphasis">nicht, wann sie Inhalte wiederholen sollten</text:span></text:p>
        </text:list-item>
        <text:list-item>
          <text:p text:style-name="P5">Normale Karteikarten ohne System führen oft zu <text:span text:style-name="Strong_20_Emphasis">ineffizientem Lernen</text:span></text:p>
        </text:list-item>
        <text:list-item>
          <text:p text:style-name="P5"><text:soft-page-break/>Zudem sind <text:span text:style-name="Strong_20_Emphasis">Datenschutz und Individualisierung</text:span> bei großen Plattformen teilweise eingeschränkt.</text:p>
        </text:list-item>
      </text:list>
      <text:h text:style-name="P6" text:outline-level="3" text:is-list-header="true">Lösung / Nutzen:</text:h>
      <text:list text:style-name="L5">
        <text:list-item>
          <text:p text:style-name="P7">Unsere Anwendung soll dieses Problem lösen.</text:p>
        </text:list-item>
      </text:list>
      <text:p text:style-name="Text_20_body">Wir entwickeln eine Plattform mit:</text:p>
      <text:list text:style-name="L6">
        <text:list-item>
          <text:p text:style-name="P8">einem <text:span text:style-name="Strong_20_Emphasis">personalisierten Wiederholungssystem</text:span>, das Inhalte in optimalen Zeitabständen wiederholt</text:p>
        </text:list-item>
        <text:list-item>
          <text:p text:style-name="P8"><text:span text:style-name="Strong_20_Emphasis">automatischer Anpassung</text:span> der Wiederholungsfrequenz je nach Lernfortschritt</text:p>
        </text:list-item>
        <text:list-item>
          <text:p text:style-name="P8">einer <text:span text:style-name="Strong_20_Emphasis">Fortschrittsanzeige und Lernstatistiken</text:span></text:p>
        </text:list-item>
        <text:list-item>
          <text:p text:style-name="P8"><text:span text:style-name="Strong_20_Emphasis">individuellen Lernempfehlungen</text:span> für Nutzer</text:p>
        </text:list-item>
        <text:list-item>
          <text:p text:style-name="P8">und <text:span text:style-name="Strong_20_Emphasis">kostenfreien Basisfunktionen</text:span>, damit jeder Zugang zu effektivem Lernen hat.</text:p>
        </text:list-item>
      </text:list>
      <text:p text:style-name="Text_20_body">Langfristig wäre die Plattform auch <text:span text:style-name="Strong_20_Emphasis">erweiterbar</text:span>, zum Beispiel durch:</text:p>
      <text:list text:style-name="L7">
        <text:list-item>
          <text:p text:style-name="P9">KI-Integration</text:p>
        </text:list-item>
        <text:list-item>
          <text:p text:style-name="P9">automatische Generierung von Fragen</text:p>
        </text:list-item>
        <text:list-item>
          <text:p text:style-name="P9">oder zusätzliche Lernfunktionen.</text:p>
        </text:list-item>
      </text:list>
      <text:h text:style-name="Heading_20_3" text:outline-level="3">Was ist das geplante Ergebnis?</text:h>
      <text:p text:style-name="Text_20_body">Am Ende des Projekts möchten wir einen <text:span text:style-name="Strong_20_Emphasis">funktionsfähigen Prototypen einer Lernplattform</text:span> präsentieren.</text:p>
      <text:p text:style-name="Text_20_body">Dieser soll es ermöglichen:</text:p>
      <text:list text:style-name="L8">
        <text:list-item>
          <text:p text:style-name="P10">Lernsets zu erstellen</text:p>
        </text:list-item>
        <text:list-item>
          <text:p text:style-name="P10">Karteikarten zu verwalten</text:p>
        </text:list-item>
        <text:list-item>
          <text:p text:style-name="P10">und ein einfaches intelligentes Wiederholungssystem zu nutzen.</text:p>
        </text:list-item>
      </text:list>
      <text:h text:style-name="Heading_20_3" text:outline-level="3">In welchem Rahmen (Zeit, Mittel, Team) soll das Projekt umgesetzt werden?</text:h>
      <text:p text:style-name="P11">Das Projekt wird im Rahmen eines <text:span text:style-name="Strong_20_Emphasis">Schulprojekts</text:span> umgesetzt.</text:p>
      <text:p text:style-name="P12">Dabei arbeiten wir:</text:p>
      <text:list text:style-name="L9">
        <text:list-item>
          <text:p text:style-name="P13">als <text:span text:style-name="Strong_20_Emphasis">vierköpfiges Team</text:span></text:p>
        </text:list-item>
        <text:list-item>
          <text:p text:style-name="P13">über mehrere Projektphasen hinweg</text:p>
        </text:list-item>
        <text:list-item>
          <text:p text:style-name="P13">mit unseren eigenen Geräten und Entwicklungswerkzeugen.</text:p>
        </text:list-item>
      </text:list>
      <text:p text:style-name="P12"><text:soft-page-break/>Unser Fokus liegt darauf, eine <text:span text:style-name="Strong_20_Emphasis">klare, funktionierende und benutzerfreundliche Webanwendung</text:span> zu entwickeln.</text:p>
      <text:p text:style-name="P14"/>
      <text:p text:style-name="P14"/>
      <text:p text:style-name="P15">Business Case</text:p>
      <text:p text:style-name="P15">Projekt Ziel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UI" svg:font-family="SegoeUI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" style:font-family-asian="'Noto Sans'" style:font-family-generic-asian="system" style:font-pitch-asian="variable" style:font-size-asian="12pt" style:font-name-complex="Aptos" style:font-family-complex="Aptos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10:32:37.666650459</meta:creation-date>
    <dc:date>2026-03-06T02:09:24.086723564</dc:date>
    <meta:editing-duration>PT19M9S</meta:editing-duration>
    <meta:editing-cycles>2</meta:editing-cycles>
    <meta:generator>LibreOffice/25.8.5.2$Linux_X86_64 LibreOffice_project/580$Build-2</meta:generator>
    <meta:document-statistic meta:table-count="0" meta:image-count="0" meta:object-count="0" meta:page-count="3" meta:paragraph-count="53" meta:word-count="334" meta:character-count="2494" meta:non-whitespace-character-count="2236"/>
  </office:meta>
</office:document-meta>
</file>